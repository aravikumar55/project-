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30000003818605F7B3D74D86F6.png" manifest:media-type="image/png"/>
  <manifest:file-entry manifest:full-path="Pictures/100000010000076500000384D647D12210912AD6.png" manifest:media-type="image/png"/>
  <manifest:file-entry manifest:full-path="Pictures/1000000100000743000003F39EDA2749939CA5CF.png" manifest:media-type="image/png"/>
  <manifest:file-entry manifest:full-path="Pictures/1000000100000718000003D8F9E3B7F31DC54ED3.png" manifest:media-type="image/png"/>
  <manifest:file-entry manifest:full-path="Pictures/100000010000074A000003D26F8A32335589DA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zonEmber" svg:font-family="AmazonEmber, 'Helvetica Neue', Helvetica, Arial,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40pt" officeooo:rsid="000aa512" officeooo:paragraph-rsid="000aa512" style:font-size-asian="35pt" style:font-size-complex="40pt"/>
    </style:style>
    <style:style style:name="P2" style:family="paragraph" style:parent-style-name="Standard">
      <style:paragraph-properties fo:break-before="page"/>
      <style:text-properties fo:font-size="18pt" officeooo:rsid="000aa512" officeooo:paragraph-rsid="000aa512" style:font-size-asian="15.75pt" style:font-size-complex="18pt"/>
    </style:style>
    <style:style style:name="P3" style:family="paragraph" style:parent-style-name="Standard">
      <style:text-properties fo:font-size="18pt" officeooo:rsid="000aa512" officeooo:paragraph-rsid="000aa512" style:font-size-asian="15.75pt" style:font-size-complex="18pt"/>
    </style:style>
    <style:style style:name="P4" style:family="paragraph" style:parent-style-name="Standard">
      <style:paragraph-properties fo:break-before="page"/>
      <style:text-properties fo:font-size="20pt" officeooo:rsid="000aa512" officeooo:paragraph-rsid="000aa512" style:font-size-asian="17.5pt" style:font-size-complex="20pt"/>
    </style:style>
    <style:style style:name="P5" style:family="paragraph" style:parent-style-name="Standard">
      <style:text-properties fo:font-size="20pt" officeooo:rsid="000aa512" officeooo:paragraph-rsid="000aa512" style:font-size-asian="17.5pt" style:font-size-complex="20pt"/>
    </style:style>
    <style:style style:name="P6" style:family="paragraph" style:parent-style-name="Text_20_body">
      <style:text-properties fo:font-variant="normal" fo:text-transform="none" fo:color="#333333" loext:opacity="100%" style:font-name="AmazonEmber" fo:font-size="15pt" fo:letter-spacing="normal" fo:font-style="normal" fo:font-weight="normal" officeooo:paragraph-rsid="000aa512" style:font-size-asian="13.1000003814697pt" style:font-size-complex="15pt"/>
    </style:style>
    <style:style style:name="P7" style:family="paragraph" style:parent-style-name="Text_20_body">
      <style:paragraph-properties fo:break-before="page"/>
      <style:text-properties fo:font-variant="normal" fo:text-transform="none" fo:color="#333333" loext:opacity="100%" style:font-name="AmazonEmber" fo:font-size="20pt" fo:letter-spacing="normal" fo:font-style="normal" fo:font-weight="normal" officeooo:paragraph-rsid="000aa512" style:font-size-asian="20pt" style:font-size-complex="20pt"/>
    </style:style>
    <style:style style:name="P8" style:family="paragraph" style:parent-style-name="Text_20_body">
      <style:paragraph-properties fo:margin-left="0cm" fo:margin-right="0cm" fo:margin-top="0.318cm" fo:margin-bottom="0.318cm" style:contextual-spacing="false" fo:orphans="2" fo:widows="2" fo:text-indent="0cm" style:auto-text-indent="false" fo:padding="0cm" fo:border="none"/>
      <style:text-properties fo:font-variant="normal" fo:text-transform="none" fo:color="#333333" loext:opacity="100%" style:font-name="AmazonEmber" fo:font-size="20pt" fo:letter-spacing="normal" fo:font-style="normal" fo:font-weight="normal" style:font-size-asian="20pt" style:font-size-complex="20pt"/>
    </style:style>
    <style:style style:name="P9"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333333" loext:opacity="100%" style:font-name="AmazonEmber" fo:font-size="20pt" fo:letter-spacing="normal" fo:font-style="normal" fo:font-weight="normal" style:font-size-asian="20pt" style:font-size-complex="20pt"/>
    </style:style>
    <style:style style:name="T1" style:family="text">
      <style:text-properties officeooo:rsid="000aa512" style:font-size-asian="15.75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text:p>
      <text:p text:style-name="P1"/>
      <text:p text:style-name="P1">create two s3 bucket in different regions and upload file in one s3 bucket and transfer the same file from one s3 bucket to other s3 bucket</text:p>
      <text:p text:style-name="P7">Amazon Simple Storage Service (Amazon S3) is an object storage service that offers industry-leading scalability, data availability, security, and performance. You can use Amazon S3 to store and retrieve any amount of data at any time, from anywhere.</text:p>
      <text:p text:style-name="P8">To get the most out of Amazon S3, you need to understand a few simple concepts. Amazon S3 stores data as objects within buckets. An object consists of a file and optionally any metadata that describes that file. To store an object in Amazon S3, you upload the file you want to store to a bucket. When you upload a file, you can set permissions on the object and any metadata.</text:p>
      <text:p text:style-name="P9">Buckets are the containers for objects. You can have one or more buckets. For each bucket, you can control access to it (who can create, delete, and list objects in the bucket), view access logs for it and its objects, and choose the geographical region where Amazon S3 will store the bucket and its contents.</text:p>
      <text:p text:style-name="P6"/>
      <text:p text:style-name="P3"/>
      <text:p text:style-name="P4">In S3, you can sidestep complex setups entirely. All you need is just</text:p>
      <text:p text:style-name="P5">provide valid credentials. You can create an IAM user for the app with</text:p>
      <text:p text:style-name="P5">anaccesskey.However,relyingsolelyonapermanentaccesskeyisn’t</text:p>
      <text:p text:style-name="P5">consideredbestpractice.Apreferableapproach involvesdeployingthe app</text:p>
      <text:p text:style-name="P5">on EC2 or ECS and utilizing IAM roles. This method generates</text:p>
      <text:p text:style-name="P5">temporary tokens and manages rotation automatically, enhancing</text:p>
      <text:p text:style-name="P5">security.</text:p>
      <text:p text:style-name="P5">Novices often misconstrue S3 as a database, when in fact, it lacks the</text:p>
      <text:p text:style-name="P5">typicalcharacteristicsofadatabasetechnology.However,itfrequently</text:p>
      <text:p text:style-name="P5">complements databases in usage scenarios. For instance, storing actual</text:p>
      <text:p text:style-name="P5">images for posts in S3 while retaining object keys in the database as</text:p>
      <text:p text:style-name="P5">pointers to these images.</text:p>
      <text:p text:style-name="P5">Many organizations in the USA use S3 as a datalake. A data lake is a</text:p>
      <text:p text:style-name="P5">centralized repository that allows you to store all your structured and</text:p>
      <text:p text:style-name="P5">unstructureddataatanyscale.OntopoftheS3datalake,youcanutilize</text:p>
      <text:p text:style-name="P5">analytical services like Athena and Glue to analyze organizational data</text:p>
      <text:p text:style-name="P5">and extract insights without impacting the business apps.</text:p>
      <text:p text:style-name="P2"><draw:frame draw:style-name="fr2" draw:name="Image2" text:anchor-type="char" svg:x="0cm" svg:y="3.09cm" svg:width="17cm" svg:height="9.627cm" draw:z-index="0"><draw:image xlink:href="Pictures/1000000100000630000003818605F7B3D74D86F6.png" xlink:type="simple" xlink:show="embed" xlink:actuate="onLoad" draw:mime-type="image/png"/></draw:frame></text:p>
      <text:p text:style-name="P2"><draw:frame draw:style-name="fr1" draw:name="Image1" text:anchor-type="char" svg:width="17cm" svg:height="10.067cm" draw:z-index="1"><draw:image xlink:href="Pictures/100000010000076500000384D647D12210912AD6.png" xlink:type="simple" xlink:show="embed" xlink:actuate="onLoad" draw:mime-type="image/png"/></draw:frame></text:p>
      <text:p text:style-name="P2"><draw:frame draw:style-name="fr1" draw:name="Image4" text:anchor-type="char" svg:width="17cm" svg:height="9.245cm" draw:z-index="2"><draw:image xlink:href="Pictures/1000000100000743000003F39EDA2749939CA5CF.png" xlink:type="simple" xlink:show="embed" xlink:actuate="onLoad" draw:mime-type="image/png"/></draw:frame></text:p>
      <text:p text:style-name="P2"><draw:frame draw:style-name="fr1" draw:name="Image3" text:anchor-type="char" svg:width="17cm" svg:height="9.211cm" draw:z-index="3"><draw:image xlink:href="Pictures/1000000100000718000003D8F9E3B7F31DC54ED3.png" xlink:type="simple" xlink:show="embed" xlink:actuate="onLoad" draw:mime-type="image/png"/></draw:frame></text:p>
      <text:p text:style-name="P2"><draw:frame draw:style-name="fr1" draw:name="Image6" text:anchor-type="char" svg:width="17cm" svg:height="9.245cm" draw:z-index="4"><draw:image xlink:href="Pictures/1000000100000743000003F39EDA2749939CA5CF.png" xlink:type="simple" xlink:show="embed" xlink:actuate="onLoad" draw:mime-type="image/png"/></draw:frame></text:p>
      <text:p text:style-name="P2"/>
      <text:p text:style-name="P3"><draw:frame draw:style-name="fr1" draw:name="Image5" text:anchor-type="char" svg:width="17cm" svg:height="8.909cm" draw:z-index="5"><draw:image xlink:href="Pictures/100000010000074A000003D26F8A32335589DABA.png" xlink:type="simple" xlink:show="embed" xlink:actuate="onLoad" draw:mime-type="image/png"/></draw:frame><text:s text:c="9"/></text:p>
      <text:p text:style-name="P5">succes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zonEmber" svg:font-family="AmazonEmber, 'Helvetica Neue', Helvetica, Arial,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7-27T15:48:10.294000000</dc:date>
    <meta:editing-duration>PT36M18S</meta:editing-duration>
    <meta:editing-cycles>1</meta:editing-cycles>
    <meta:document-statistic meta:table-count="0" meta:image-count="6" meta:object-count="0" meta:page-count="9" meta:paragraph-count="24" meta:word-count="327" meta:character-count="2114" meta:non-whitespace-character-count="1801"/>
    <meta:generator>LibreOffice/7.4.0.3$Windows_X86_64 LibreOffice_project/f85e47c08ddd19c015c0114a68350214f7066f5a</meta:generator>
  </office:meta>
</office:document-meta>
</file>